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11in" style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33cc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.139in" style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.5in" fo:margin-right="0in" fo:margin-top="0in" fo:margin-bottom="0in" style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in" style:contextual-spacing="false" fo:line-height="138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" style:family="paragraph" style:parent-style-name="Text_20_body">
      <style:paragraph-properties fo:margin-left="0.5in" fo:margin-right="0in" fo:text-indent="0in" style:auto-text-indent="false"/>
    </style:style>
    <style:style style:name="P7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style:contextual-spacing="false" fo:line-height="138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4">
      <loext:graphic-properties draw:fill="none" draw:fill-color="#ffffff"/>
      <style:paragraph-properties fo:margin-left="0.5in" fo:margin-right="0in" fo:margin-top="0in" fo:margin-bottom="0in" style:contextual-spacing="false" fo:line-height="138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.139in" style:contextual-spacing="false" fo:line-height="138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6">
      <loext:graphic-properties draw:fill="none" draw:fill-color="#ffffff"/>
      <style:paragraph-properties fo:margin-left="0.5in" fo:margin-right="0in" fo:margin-top="0in" fo:margin-bottom="0in" style:contextual-spacing="false" fo:line-height="138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1" style:family="paragraph" style:parent-style-name="Text_20_body" style:list-style-name="L6">
      <loext:graphic-properties draw:fill="none" draw:fill-color="#ffffff"/>
      <style:paragraph-properties fo:margin-left="0.5in" fo:margin-right="0in" fo:margin-top="0in" fo:margin-bottom="0.139in" style:contextual-spacing="false" fo:line-height="138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tyle="italic" fo:font-weight="bold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4010be58-7fff-349f-ff10-08534163c639"/>Actividad Nº 2 (Responder directamente en este documento)</text:p>
      <text:p text:style-name="P2">Responda de forma concisa, y justifique cuando haga falta: </text:p>
      <text:list text:style-name="L1">
        <text:list-item>
          <text:p text:style-name="P3">¿Es lo mismo el Diagrama Entidad-Relación que el Modelo Entidad-Relacion? </text:p>
        </text:list-item>
      </text:list>
      <text:p text:style-name="Text_20_body"/>
      <text:p text:style-name="P4">NO. </text:p>
      <text:p text:style-name="Text_20_body"/>
      <text:list text:style-name="L2">
        <text:list-item>
          <text:p text:style-name="P5"><text:span text:style-name="T1">El </text:span><text:span text:style-name="T2">DER </text:span><text:span text:style-name="T1">es la organización de los datos (registro individual) en tablas. </text:span></text:p>
        </text:list-item>
        <text:list-item>
          <text:p text:style-name="P5"><text:span text:style-name="T1">El </text:span><text:span text:style-name="T2">MER</text:span><text:span text:style-name="T1"> es la representación gráfica del sistema que queremos crear a base de un conjunto de objetos (formas geométricas) para identificar las entidades, sus atributos (campos) y los tipos de relaciones que tienen entre entidades</text:span></text:p>
        </text:list-item>
      </text:list>
      <text:p text:style-name="P6"/>
      <text:list text:style-name="L3">
        <text:list-item>
          <text:p text:style-name="P7">Una Base de Datos Relacional en Lenguaje SQL, ¿Qué características  cumple? </text:p>
        </text:list-item>
      </text:list>
      <text:p text:style-name="Text_20_body"/>
      <text:p text:style-name="P4">Una base de datos relacional en lenguaje SQL se caracteriza por relacionar las entidades (Tablas) mediante  Primary Key - Foreign Key aplicando la Normalización de los datos en sus 3 formas normales. </text:p>
      <text:p text:style-name="Text_20_body"/>
      <text:list text:style-name="L4">
        <text:list-item>
          <text:p text:style-name="P8">Primera forma normal: asegura la atomicidad (un solo valor por campo) eliminando datos repetidos y cada entidad debe tener una PK. </text:p>
        </text:list-item>
        <text:list-item>
          <text:p text:style-name="P8">Segunda forma normal: se basa en aplicar  la 1ra FN y eliminando dependencias parciales, asegurando que cada dato dependa de la PK en su totalidad.</text:p>
        </text:list-item>
        <text:list-item>
          <text:p text:style-name="P8">La tercera forma normal: se basa en aplicar la 2da FN eliminando las dependencias transitivas. Garantizando que todos los datos solo dependan de la PK, esto facilita el mantenimiento de las tablas (borrar, insertar y actualizar datos) .</text:p>
        </text:list-item>
      </text:list>
      <text:p text:style-name="P6"/>
      <text:list text:style-name="L5">
        <text:list-item>
          <text:p text:style-name="P9">¿Qué es una clave primaria (Primary-Key) y por qué es importante? ¿Y una clave foránea? </text:p>
        </text:list-item>
      </text:list>
      <text:list text:style-name="L6">
        <text:list-item>
          <text:p text:style-name="P10"><text:span text:style-name="T1">La </text:span><text:span text:style-name="T2">Primary Key</text:span><text:span text:style-name="T1"> es una columna especial designada para identificar unívocamente cada registro (dato). </text:span></text:p>
        </text:list-item>
        <text:list-item>
          <text:p text:style-name="P11"><text:span text:style-name="T1">La </text:span><text:span text:style-name="T2">Foreign Key</text:span><text:span text:style-name="T1"> es una columna que provee un vínculo entre tablas, siempre referencia a la PK de otra tabla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12:33:41.885617637</meta:creation-date>
    <dc:date>2026-03-13T12:34:40.657834885</dc:date>
    <meta:editing-duration>PT1M</meta:editing-duration>
    <meta:editing-cycles>1</meta:editing-cycles>
    <meta:document-statistic meta:table-count="0" meta:image-count="0" meta:object-count="0" meta:page-count="1" meta:paragraph-count="14" meta:word-count="262" meta:character-count="1600" meta:non-whitespace-character-count="1350"/>
    <meta:generator>LibreOffice/25.8.5.2$Linux_X86_64 LibreOffice_project/252c20f6956e3db0b52e6e2f9dda67263513c8fc</meta:generator>
  </office:meta>
</office:document-meta>
</file>