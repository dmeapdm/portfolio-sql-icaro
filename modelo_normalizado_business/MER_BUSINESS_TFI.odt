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35ba" officeooo:paragraph-rsid="001735ba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6b5e9b"/>
      <style:paragraph-properties fo:text-align="center" style:writing-mode="lr-tb"/>
    </style:style>
    <style:style style:name="P4" style:family="paragraph">
      <loext:graphic-properties draw:fill-color="#b3cac7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svg:stroke-color="#6b5e9b" draw:fill-color="#6b5e9b" draw:textarea-horizontal-align="justify" draw:textarea-vertical-align="middle" draw:auto-grow-height="false" fo:min-height="0.6173in" fo:min-width="1.4917in" style:writing-mode="lr-tb" loext:decorative="false" style:run-through="foreground"/>
      <style:paragraph-properties style:writing-mode="lr-tb"/>
    </style:style>
    <style:style style:name="gr4" style:family="graphic">
      <style:graphic-properties draw:fill-color="#b3cac7" draw:textarea-horizontal-align="justify" draw:textarea-vertical-align="middle" draw:auto-grow-height="false" fo:min-height="0.4492in" fo:min-width="0.8228in" style:writing-mode="lr-tb" loext:decorative="false" style:run-through="foreground"/>
      <style:paragraph-properties style:writing-mode="lr-tb"/>
    </style:style>
    <style:style style:name="gr5" style:family="graphic">
      <style:graphic-properties draw:marker-end="Arrow" draw:marker-end-width="0.0693in" draw:textarea-horizontal-align="center" draw:textarea-vertical-align="middle" loext:decorative="false" style:run-through="foreground"/>
    </style:style>
    <style:style style:name="gr6" style:family="graphic">
      <style:graphic-properties svg:stroke-color="#6b5e9b" draw:fill-color="#6b5e9b" draw:textarea-horizontal-align="justify" draw:textarea-vertical-align="middle" draw:auto-grow-height="false" fo:min-height="0.7366in" fo:min-width="1.4929in" style:writing-mode="lr-tb" loext:decorative="false" style:run-through="foreground"/>
      <style:paragraph-properties style:writing-mode="lr-tb"/>
    </style:style>
    <style:style style:name="gr7" style:family="graphic">
      <style:graphic-properties svg:stroke-color="#6b5e9b" draw:fill-color="#6b5e9b" draw:textarea-horizontal-align="justify" draw:textarea-vertical-align="middle" draw:auto-grow-height="false" fo:min-height="0.7827in" fo:min-width="1.5138in" style:writing-mode="lr-tb" loext:decorative="false" style:run-through="foreground"/>
      <style:paragraph-properties style:writing-mode="lr-tb"/>
    </style:style>
    <style:style style:name="gr8" style:family="graphic">
      <style:graphic-properties svg:stroke-color="#6b5e9b" draw:fill-color="#6b5e9b" draw:textarea-horizontal-align="justify" draw:textarea-vertical-align="middle" draw:auto-grow-height="false" fo:min-height="0.6508in" fo:min-width="1.3929in" style:writing-mode="lr-tb" loext:decorative="false" style:run-through="foreground"/>
      <style:paragraph-properties style:writing-mode="lr-tb"/>
    </style:style>
    <style:style style:name="gr9" style:family="graphic">
      <style:graphic-properties draw:textarea-horizontal-align="center" draw:textarea-vertical-align="middle" loext:decorative="false" style:run-through="foreground"/>
    </style:style>
    <style:style style:name="gr10" style:family="graphic">
      <style:graphic-properties draw:fill-color="#77bc65" draw:textarea-horizontal-align="justify" draw:textarea-vertical-align="middle" draw:auto-grow-height="false" fo:min-height="0.4736in" fo:min-width="0.5256in" style:writing-mode="lr-tb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g text:anchor-type="paragraph" draw:z-index="0" draw:name="DrawObject1" draw:style-name="gr1"><draw:g draw:name="DrawObject3" draw:style-name="gr2"><draw:custom-shape draw:name="Shape 3" draw:style-name="gr3" draw:text-style-name="P3" svg:width="1.5587in" svg:height="0.6843in" svg:x="4.6736in" svg:y="2.5327in"><text:p text:style-name="P2">ARTICUL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name="Shape 6" draw:style-name="gr4" draw:text-style-name="P4" svg:width="1.1634in" svg:height="0.6343in" svg:x="5.8665in" svg:y="1.6717in"><text:p text:style-name="P2">Pre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7" draw:style-name="gr4" draw:text-style-name="P4" svg:width="1.1634in" svg:height="0.6343in" svg:x="4.7657in" svg:y="1.2in"><text:p text:style-name="P2">Nom_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3" draw:style-name="gr4" draw:text-style-name="P4" svg:width="1.1634in" svg:height="0.6343in" svg:x="3.6709in" svg:y="1.7319in"><text:p text:style-name="P2">Id_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 4" draw:style-name="gr5" draw:text-style-name="P2" svg:x1="4.9646in" svg:y1="2.5327in" svg:x2="4.652in" svg:y2="2.2701in"><text:p/></draw:line><draw:line draw:name="Line 5" draw:style-name="gr5" draw:text-style-name="P2" svg:x1="5.3465in" svg:y1="2.4957in" svg:x2="5.3547in" svg:y2="1.8339in"><text:p/></draw:line><draw:line draw:name="Line 6" draw:style-name="gr5" draw:text-style-name="P2" svg:x1="5.8327in" svg:y1="2.5327in" svg:x2="6.0756in" svg:y2="2.2272in"><text:p/></draw:line></draw:g><draw:g draw:name="DrawObject1" draw:style-name="gr2"><draw:custom-shape draw:name="Shape 2" draw:style-name="gr6" draw:text-style-name="P3" svg:width="1.5724in" svg:height="0.8161in" svg:x="1.1972in" svg:y="4.5709in"><text:p text:style-name="P2">ORDE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name="Shape 9" draw:style-name="gr4" draw:text-style-name="P4" svg:width="1.1634in" svg:height="0.6343in" svg:x="0.4429in" svg:y="5.7772in"><text:p text:style-name="P2">Id_ord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1" draw:style-name="gr4" draw:text-style-name="P4" svg:width="1.1634in" svg:height="0.6343in" svg:x="1.3201in" svg:y="6.411in"><text:p text:style-name="P2">Fech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2" draw:style-name="gr4" draw:text-style-name="P4" svg:width="1.1634in" svg:height="0.6343in" svg:x="2.1709in" svg:y="5.7772in"><text:p text:style-name="P2">Id_clien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 7" draw:style-name="gr5" draw:text-style-name="P2" svg:x1="1.5102in" svg:y1="5.3346in" svg:x2="1.1547in" svg:y2="5.7772in"><text:p/></draw:line><draw:line draw:name="Line 8" draw:style-name="gr5" draw:text-style-name="P2" svg:x1="1.8929in" svg:y1="5.3874in" svg:x2="1.9012in" svg:y2="6.411in"><text:p/></draw:line><draw:line draw:name="Line 9" draw:style-name="gr5" draw:text-style-name="P2" svg:x1="2.5008in" svg:y1="5.3354in" svg:x2="2.648in" svg:y2="5.7772in"><text:p/></draw:line></draw:g><draw:g draw:name="DrawObject2" draw:style-name="gr2"><draw:custom-shape draw:name="Shape 4" draw:style-name="gr7" draw:text-style-name="P3" svg:width="1.5976in" svg:height="0.8661in" svg:x="4.5744in" svg:y="4.5012in"><text:p text:style-name="P2">DETALLE_ORDE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name="Shape 14" draw:style-name="gr4" draw:text-style-name="P4" svg:width="1.1634in" svg:height="0.6343in" svg:x="3.9937in" svg:y="5.7937in"><text:p text:style-name="P2">Id_ord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5" draw:style-name="gr4" draw:text-style-name="P4" svg:width="1.1634in" svg:height="0.6343in" svg:x="4.922in" svg:y="6.4972in"><text:p text:style-name="P2">Id_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6" draw:style-name="gr4" draw:text-style-name="P4" svg:width="1.1634in" svg:height="0.6343in" svg:x="5.8421in" svg:y="5.7591in"><text:p text:style-name="P2">Ca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 10" draw:style-name="gr5" draw:text-style-name="P2" svg:x1="4.8862in" svg:y1="5.3673in" svg:x2="4.739in" svg:y2="5.8382in"><text:p/></draw:line><draw:line draw:name="Line 11" draw:style-name="gr5" draw:text-style-name="P2" svg:x1="5.3555in" svg:y1="5.3673in" svg:x2="5.4421in" svg:y2="6.4972in"><text:p/></draw:line><draw:line draw:name="Line 12" draw:style-name="gr5" draw:text-style-name="P2" svg:x1="5.9028in" svg:y1="5.3673in" svg:x2="6.198in" svg:y2="5.8118in"><text:p/></draw:line></draw:g><draw:g draw:name="DrawObject4" draw:style-name="gr2"><draw:custom-shape draw:name="Shape 1" draw:style-name="gr8" draw:text-style-name="P3" svg:width="1.463in" svg:height="0.7205in" svg:x="1.2102in" svg:y="2.5311in"><text:p text:style-name="P2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name="Shape 5" draw:style-name="gr4" draw:text-style-name="P4" svg:width="1.1634in" svg:height="0.6343in" svg:x="2.2839in" svg:y="1.7319in"><text:p text:style-name="P2">Ciuda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8" draw:style-name="gr4" draw:text-style-name="P4" svg:width="1.1634in" svg:height="0.6343in" svg:x="0.2346in" svg:y="1.7756in"><text:p text:style-name="P2">Id_clien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0" draw:style-name="gr4" draw:text-style-name="P4" svg:width="1.1634in" svg:height="0.6343in" svg:x="1.2598in" svg:y="1.1937in"><text:p text:style-name="P2">Nom_clien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 1" draw:style-name="gr5" draw:text-style-name="P2" svg:x1="1.311in" svg:y1="2.5311in" svg:x2="1.0937in" svg:y2="2.3484in"><text:p/></draw:line><draw:line draw:name="Line 3" draw:style-name="gr5" draw:text-style-name="P2" svg:x1="2.3354in" svg:y1="2.5311in" svg:x2="2.5264in" svg:y2="2.3055in"><text:p/></draw:line><draw:line draw:name="Line 2" draw:style-name="gr5" draw:text-style-name="P2" svg:x1="1.9358in" svg:y1="2.5307in" svg:x2="1.8665in" svg:y2="1.8272in"><text:p/></draw:line></draw:g><draw:line draw:name="Vertical line 1" draw:style-name="gr5" draw:text-style-name="P2" svg:x1="1.9008in" svg:y1="3.2508in" svg:x2="1.9008in" svg:y2="4.5701in"><text:p/></draw:line><draw:line draw:name="Line 13" draw:style-name="gr5" draw:text-style-name="P2" svg:x1="2.7693in" svg:y1="5.0138in" svg:x2="4.574in" svg:y2="5.022in"><text:p/></draw:line><draw:line draw:name="Line 14" draw:style-name="gr9" draw:text-style-name="P2" svg:x1="5.4244in" svg:y1="3.2165in" svg:x2="5.4335in" svg:y2="4.5012in"><text:p/></draw:line><draw:custom-shape draw:name="Shape 20" draw:style-name="gr10" draw:text-style-name="P5" svg:width="1.0512in" svg:height="0.9469in" svg:x="1.3799in" svg:y="3.3555in"><text:p text:style-name="P2">1 : 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 17" draw:style-name="gr10" draw:text-style-name="P5" svg:width="1.0512in" svg:height="0.9469in" svg:x="4.9035in" svg:y="3.3984in"><text:p text:style-name="P2">1 : 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 19" draw:style-name="gr10" draw:text-style-name="P5" svg:width="1.0512in" svg:height="0.9469in" svg:x="3.1063in" svg:y="4.5362in"><text:p text:style-name="P2">1 : 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MODELO RELACION-ENTIDAD (ME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0:07:19.003210245</meta:creation-date>
    <dc:date>2026-03-13T12:16:21.551750888</dc:date>
    <meta:editing-duration>PT1H20M47S</meta:editing-duration>
    <meta:editing-cycles>2</meta:editing-cycles>
    <meta:generator>LibreOffice/25.8.5.2$Linux_X86_64 LibreOffice_project/252c20f6956e3db0b52e6e2f9dda67263513c8fc</meta:generator>
    <meta:document-statistic meta:table-count="0" meta:image-count="0" meta:object-count="0" meta:page-count="1" meta:paragraph-count="1" meta:word-count="3" meta:character-count="29" meta:non-whitespace-character-count="27"/>
  </office:meta>
</office:document-meta>
</file>